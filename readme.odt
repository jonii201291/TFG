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Preformatted_20_Text">
      <style:paragraph-properties fo:margin-left="0cm" fo:margin-right="0cm" fo:margin-top="0cm" fo:margin-bottom="0.499cm" style:contextual-spacing="false" fo:text-indent="0cm" style:auto-text-indent="false"/>
    </style:style>
    <style:style style:name="P2" style:family="paragraph" style:parent-style-name="Preformatted_20_Text">
      <style:paragraph-properties fo:margin-left="0cm" fo:margin-right="0cm" fo:margin-top="0cm" fo:margin-bottom="0cm" style:contextual-spacing="false" fo:text-indent="0cm" style:auto-text-indent="false" fo:padding="0cm" fo:border="none" style:writing-mode="lr-tb"/>
    </style:style>
    <style:style style:name="P3" style:family="paragraph" style:parent-style-name="Preformatted_20_Text">
      <style:paragraph-properties fo:margin-left="0cm" fo:margin-right="0cm" fo:margin-top="0cm" fo:margin-bottom="0cm" style:contextual-spacing="false" fo:padding="0cm" fo:border="none" style:writing-mode="lr-tb"/>
    </style:style>
    <style:style style:name="P4" style:family="paragraph" style:parent-style-name="Standard">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5" style:family="paragraph" style:parent-style-name="Standard">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48" style:family="paragraph" style:parent-style-name="Text_20_body" style:list-style-name="L36">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49" style:family="paragraph" style:parent-style-name="Text_20_body">
      <style:paragraph-properties fo:margin-left="0cm" fo:margin-right="0cm" fo:margin-top="0.318cm" fo:margin-bottom="0.423cm" style:contextual-spacing="false" fo:text-indent="0cm" style:auto-text-indent="false"/>
      <style:text-properties style:text-line-through-style="none" style:text-line-through-type="none" style:font-name="Google Sans" fo:font-size="12pt" style:text-underline-style="none" fo:font-weight="normal" style:text-blinking="false" loext:padding="0cm" loext:border="none"/>
    </style:style>
    <style:style style:name="P50" style:family="paragraph" style:parent-style-name="Text_20_body" style:list-style-name="L37">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51" style:family="paragraph" style:parent-style-name="Text_20_body" style:list-style-name="L38">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52" style:family="paragraph" style:parent-style-name="Text_20_body" style:list-style-name="L39">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53" style:family="paragraph" style:parent-style-name="Text_20_body" style:list-style-name="L40">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54" style:family="paragraph" style:parent-style-name="Text_20_body" style:list-style-name="L41">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55" style:family="paragraph" style:parent-style-name="Text_20_body" style:list-style-name="L42">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56" style:family="paragraph" style:parent-style-name="Text_20_body" style:list-style-name="L43">
      <style:paragraph-properties fo:margin-left="0cm" fo:margin-right="0cm" fo:margin-top="0cm" fo:margin-bottom="0cm" style:contextual-spacing="false" fo:text-indent="0cm" style:auto-text-indent="false" fo:padding="0cm" fo:border="none"/>
      <style:text-properties style:text-line-through-style="none" style:text-line-through-type="none" style:font-name="Google Sans" fo:font-size="12pt" style:text-underline-style="none" fo:font-weight="normal" style:text-blinking="false" loext:padding="0cm" loext:border="none"/>
    </style:style>
    <style:style style:name="P57" style:family="paragraph" style:parent-style-name="Text_20_body">
      <style:paragraph-properties fo:margin-left="0cm" fo:margin-right="0cm" fo:margin-top="0.635cm" fo:margin-bottom="0.318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58" style:family="paragraph" style:parent-style-name="Text_20_body">
      <style:paragraph-properties fo:margin-left="0cm" fo:margin-right="0cm" fo:margin-top="0cm" fo:margin-bottom="0cm" style:contextual-spacing="false" fo:text-indent="0cm" style:auto-text-indent="false"/>
      <style:text-properties style:text-line-through-style="none" style:text-line-through-type="none" style:font-name="Google Sans" fo:font-size="15pt" style:text-underline-style="none" fo:font-weight="bold" style:text-blinking="false" loext:padding="0cm" loext:border="none"/>
    </style:style>
    <style:style style:name="P59" style:family="paragraph" style:parent-style-name="Text_20_body">
      <style:paragraph-properties fo:margin-left="0cm" fo:margin-right="0cm" fo:margin-top="0cm" fo:margin-bottom="0cm" style:contextual-spacing="false" fo:text-indent="0cm" style:auto-text-indent="false"/>
      <style:text-properties style:text-line-through-style="none" style:text-line-through-type="none" style:font-name="Google Sans" fo:font-size="9pt" style:text-underline-style="none" fo:font-weight="normal" style:text-blinking="false" loext:padding="0cm" loext:border="none"/>
    </style:style>
    <style:style style:name="P60" style:family="paragraph" style:parent-style-name="Text_20_body" style:list-style-name="L41">
      <style:paragraph-properties fo:margin-left="0cm" fo:margin-right="0cm" fo:margin-top="0cm" fo:margin-bottom="0cm" style:contextual-spacing="false" fo:text-indent="0cm" style:auto-text-indent="false" fo:padding="0cm" fo:border="none" style:writing-mode="lr-tb"/>
    </style:style>
    <style:style style:name="T1" style:family="text">
      <style:text-properties officeooo:rsid="0007be13"/>
    </style:style>
    <style:style style:name="T2" style:family="text">
      <style:text-properties style:text-line-through-style="none" style:text-line-through-type="none" style:font-name="monospace" fo:font-size="10.5pt" style:text-underline-style="none" fo:font-weight="normal" style:text-blinking="false" loext:padding="0cm" loext:border="none"/>
    </style:style>
    <style:style style:name="T3" style:family="text">
      <style:text-properties style:text-line-through-style="none" style:text-line-through-type="none" style:font-name="monospace" fo:font-size="10.5pt" style:text-underline-style="none" fo:font-weight="normal" style:text-blinking="false" loext:padding-left="0cm" loext:padding-right="0cm" loext:padding-top="0cm" loext:padding-bottom="0.049cm" loext:border-left="none" loext:border-right="none" loext:border-top="none" loext:border-bottom="0.06pt solid #f0f2f5"/>
    </style:style>
    <style:style style:name="T4" style:family="text">
      <style:text-properties style:text-line-through-style="none" style:text-line-through-type="none" style:font-name="Google Sans" fo:font-size="12pt" style:text-underline-style="none" fo:font-weight="normal" style:text-blinking="false"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scripción del proyecto</text:h>
      <text:p text:style-name="Text_20_body">Este proyecto es una aplicación web desarrollada con <text:span text:style-name="Strong_20_Emphasis">Java + Spring Boot</text:span>, orientada a la gestión de adopción de animales.</text:p>
      <text:p text:style-name="Text_20_body">Permite visualizar animales disponibles, acceder a información de servicios relacionados con protectoras, y realizar solicitudes de adopción mediante un formulario.</text:p>
      <text:p text:style-name="Text_20_body">Incluye una interfaz moderna con páginas separadas para cada sección del sistema.</text:p>
      <text:p text:style-name="Horizontal_20_Line"/>
      <text:h text:style-name="Heading_20_2" text:outline-level="2">🧩 Funcionalidades implementadas</text:h>
      <text:list text:style-name="L1">
        <text:list-item>
          <text:p text:style-name="P7">Página principal con diseño visual y navegación fija </text:p>
        </text:list-item>
        <text:list-item>
          <text:p text:style-name="P7">Carrusel de animales en adopción con animación horizontal </text:p>
        </text:list-item>
        <text:list-item>
          <text:p text:style-name="P7">Ficha rápida de cada animal mediante interacción (alert/confirm) </text:p>
        </text:list-item>
        <text:list-item>
          <text:p text:style-name="P7">Redirección al formulario de adopción </text:p>
        </text:list-item>
        <text:list-item>
          <text:p text:style-name="P7">Secciones independientes del sistema: </text:p>
          <text:list>
            <text:list-item>
              <text:p text:style-name="P7">🐶 Adopciones (lista de animales por especie) </text:p>
            </text:list-item>
            <text:list-item>
              <text:p text:style-name="P7">🏥 Atención veterinaria (servicios clínicos) </text:p>
            </text:list-item>
            <text:list-item>
              <text:p text:style-name="P7">🚨 Rescate animal (información y pautas) </text:p>
            </text:list-item>
            <text:list-item>
              <text:p text:style-name="P7">🎗️ Campañas solidarias (productos benéficos) </text:p>
            </text:list-item>
          </text:list>
        </text:list-item>
        <text:list-item>
          <text:p text:style-name="P7">Formulario de solicitud de adopción </text:p>
        </text:list-item>
        <text:list-item>
          <text:p text:style-name="P6">Navegación entre páginas mediante Spring Boot Controller </text:p>
        </text:list-item>
      </text:list>
      <text:p text:style-name="Horizontal_20_Line"/>
      <text:h text:style-name="Heading_20_2" text:outline-level="2">🏗️ Estructura del proyecto</text:h>
      <text:p text:style-name="Text_20_body">El proyecto está organizado en una arquitectura básica MVC:</text:p>
      <text:list text:style-name="L2">
        <text:list-item>
          <text:p text:style-name="P9"><text:span text:style-name="Strong_20_Emphasis">Controller</text:span> </text:p>
          <text:list>
            <text:list-item>
              <text:p text:style-name="P9">Manejo de rutas (HomeController) </text:p>
            </text:list-item>
          </text:list>
        </text:list-item>
        <text:list-item>
          <text:p text:style-name="P9"><text:span text:style-name="Strong_20_Emphasis">Model</text:span> </text:p>
          <text:list>
            <text:list-item>
              <text:p text:style-name="P9">Entidades del sistema (Animal) </text:p>
            </text:list-item>
          </text:list>
        </text:list-item>
        <text:list-item>
          <text:p text:style-name="P9"><text:span text:style-name="Strong_20_Emphasis">Repository</text:span> </text:p>
          <text:list>
            <text:list-item>
              <text:p text:style-name="P9">Acceso a base de datos (Spring Data JPA) </text:p>
            </text:list-item>
          </text:list>
        </text:list-item>
        <text:list-item>
          <text:p text:style-name="P9"><text:span text:style-name="Strong_20_Emphasis">Templates</text:span> </text:p>
          <text:list>
            <text:list-item>
              <text:p text:style-name="P9">Vistas HTML (Thymeleaf) </text:p>
            </text:list-item>
            <text:list-item>
              <text:p text:style-name="P9">index, adopciones, veterinaria, rescate, campañas, formulario </text:p>
            </text:list-item>
          </text:list>
        </text:list-item>
        <text:list-item>
          <text:p text:style-name="P9"><text:span text:style-name="Strong_20_Emphasis">Config</text:span> </text:p>
          <text:list>
            <text:list-item>
              <text:p text:style-name="P8">Carga de datos iniciales en la base de datos </text:p>
            </text:list-item>
          </text:list>
        </text:list-item>
      </text:list>
      <text:p text:style-name="Horizontal_20_Line"/>
      <text:h text:style-name="Heading_20_2" text:outline-level="2">🛠️ Tecnologías utilizadas</text:h>
      <text:list text:style-name="L3">
        <text:list-item>
          <text:p text:style-name="P11">Java 21 </text:p>
        </text:list-item>
        <text:list-item>
          <text:p text:style-name="P11">Spring Boot </text:p>
        </text:list-item>
        <text:list-item>
          <text:p text:style-name="P11"><text:soft-page-break/>Spring MVC </text:p>
        </text:list-item>
        <text:list-item>
          <text:p text:style-name="P11">Spring Data JPA </text:p>
        </text:list-item>
        <text:list-item>
          <text:p text:style-name="P11">Thymeleaf </text:p>
        </text:list-item>
        <text:list-item>
          <text:p text:style-name="P11">HTML5 </text:p>
        </text:list-item>
        <text:list-item>
          <text:p text:style-name="P11">CSS3 </text:p>
        </text:list-item>
        <text:list-item>
          <text:p text:style-name="P11">JavaScript </text:p>
        </text:list-item>
        <text:list-item>
          <text:p text:style-name="P11">H2 Database (en memoria) </text:p>
        </text:list-item>
        <text:list-item>
          <text:p text:style-name="P10">Maven </text:p>
        </text:list-item>
      </text:list>
      <text:p text:style-name="Horizontal_20_Line"/>
      <text:h text:style-name="Heading_20_2" text:outline-level="2">🎨 Características de la interfaz</text:h>
      <text:list text:style-name="L4">
        <text:list-item>
          <text:p text:style-name="P13">Diseño responsive básico </text:p>
        </text:list-item>
        <text:list-item>
          <text:p text:style-name="P13">Animaciones CSS (entrada y carrusel automático) </text:p>
        </text:list-item>
        <text:list-item>
          <text:p text:style-name="P13">Tarjetas visuales para animales y servicios </text:p>
        </text:list-item>
        <text:list-item>
          <text:p text:style-name="P13">Navegación fija superior </text:p>
        </text:list-item>
        <text:list-item>
          <text:p text:style-name="P12">Experiencia tipo portal de protectora de animales </text:p>
        </text:list-item>
      </text:list>
      <text:p text:style-name="Horizontal_20_Line"/>
      <text:h text:style-name="Heading_20_2" text:outline-level="2">🚀 Cómo ejecutar el proyecto</text:h>
      <text:list text:style-name="L5">
        <text:list-item>
          <text:p text:style-name="P15">Tener instalado: </text:p>
          <text:list>
            <text:list-item>
              <text:p text:style-name="P15">Java JDK 21 </text:p>
            </text:list-item>
            <text:list-item>
              <text:p text:style-name="P15">Maven </text:p>
            </text:list-item>
          </text:list>
        </text:list-item>
        <text:list-item>
          <text:p text:style-name="P14">Ejecutar el proyecto: </text:p>
        </text:list-item>
      </text:list>
      <text:section text:style-name="Sect1" text:name="code-block-viewer">
        <text:p text:style-name="P1"><text:span text:style-name="Source_20_Text">mvn spring-boot:run</text:span></text:p>
      </text:section>
      <text:list text:style-name="L6">
        <text:list-item>
          <text:p text:style-name="P16">Abrir en el navegador: </text:p>
        </text:list-item>
      </text:list>
      <text:section text:style-name="Sect1" text:name="Sección1">
        <text:p text:style-name="P1"><text:bookmark text:name="code-block-viewer"/><text:span text:style-name="Source_20_Text">http://localhost:8080</text:span></text:p>
      </text:section>
      <text:p text:style-name="Horizontal_20_Line"/>
      <text:h text:style-name="Heading_20_2" text:outline-level="2">👤 Usuarios de prueba (si se añade seguridad)</text:h>
      <text:list text:style-name="L7">
        <text:list-item>
          <text:p text:style-name="P18">Administrador: <text:span text:style-name="Source_20_Text">admin / 1234</text:span> </text:p>
        </text:list-item>
        <text:list-item>
          <text:p text:style-name="P17">Empleado: <text:span text:style-name="Source_20_Text">empleado / 1234</text:span> </text:p>
        </text:list-item>
      </text:list>
      <text:p text:style-name="Horizontal_20_Line"/>
      <text:h text:style-name="Heading_20_2" text:outline-level="2">📌 Estado actual del proyecto</text:h>
      <text:p text:style-name="Text_20_body">✔ Interfaz web completa<text:line-break/>✔ Navegación entre páginas<text:line-break/>✔ Carrusel de animales<text:line-break/>✔ Formularios básicos<text:line-break/>✔ Estructura Spring Boot<text:line-break/><text:soft-page-break/>✔ Integración con base de datos (H2)<text:line-break/>🔜 Login real con Spring Security<text:line-break/>🔜 Panel de administración<text:line-break/>🔜 CRUD completo de animales<text:line-break/>🔜 Sistema de adopciones persistente</text:p>
      <text:p text:style-name="Horizontal_20_Line"/>
      <text:h text:style-name="Heading_20_2" text:outline-level="2">💡 Futuras mejoras</text:h>
      <text:list text:style-name="L8">
        <text:list-item>
          <text:p text:style-name="P20">Sistema de usuarios con roles reales </text:p>
        </text:list-item>
        <text:list-item>
          <text:p text:style-name="P20">Gestión completa de animales desde panel admin </text:p>
        </text:list-item>
        <text:list-item>
          <text:p text:style-name="P20">Subida de imágenes </text:p>
        </text:list-item>
        <text:list-item>
          <text:p text:style-name="P20">Base de datos MySQL en producción </text:p>
        </text:list-item>
        <text:list-item>
          <text:p text:style-name="P19">API REST para futuras apps móvil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ECO-VEG - Plataforma de Gestión de Adopciones y Servicios Veterinarios</text:h>
      <text:h text:style-name="Heading_20_2" text:outline-level="2">1. Descripción del proyecto</text:h>
      <text:p text:style-name="Text_20_body">Eco-Veg es una aplicación web desarrollada con Spring Boot cuyo objetivo es gestionar un centro de adopción animal y servicios veterinarios.</text:p>
      <text:p text:style-name="Text_20_body">La aplicación permite:</text:p>
      <text:list text:style-name="L9">
        <text:list-item>
          <text:p text:style-name="P21">Mostrar animales disponibles para adopción.</text:p>
        </text:list-item>
        <text:list-item>
          <text:p text:style-name="P21">Gestionar solicitudes de adopción.</text:p>
        </text:list-item>
        <text:list-item>
          <text:p text:style-name="P21">Gestionar servicios veterinarios.</text:p>
        </text:list-item>
        <text:list-item>
          <text:p text:style-name="P21">Gestionar campañas solidarias.</text:p>
        </text:list-item>
        <text:list-item>
          <text:p text:style-name="P21">Gestionar productos solidarios.</text:p>
        </text:list-item>
        <text:list-item>
          <text:p text:style-name="P21">Controlar usuarios con diferentes roles.</text:p>
        </text:list-item>
        <text:list-item>
          <text:p text:style-name="P21"><text:soft-page-break/>Administrar animales, productos y servicios desde un panel de administración.</text:p>
        </text:list-item>
      </text:list>
      <text:p text:style-name="Horizontal_20_Line"/>
      <text:h text:style-name="Heading_20_1" text:outline-level="1">2. Tecnologías utilizadas</text:h>
      <text:h text:style-name="Heading_20_2" text:outline-level="2">Backend</text:h>
      <text:list text:style-name="L10">
        <text:list-item>
          <text:p text:style-name="P22">Java 22</text:p>
        </text:list-item>
        <text:list-item>
          <text:p text:style-name="P22">Spring Boot</text:p>
        </text:list-item>
        <text:list-item>
          <text:p text:style-name="P22">Spring MVC</text:p>
        </text:list-item>
        <text:list-item>
          <text:p text:style-name="P22">Spring Security</text:p>
        </text:list-item>
        <text:list-item>
          <text:p text:style-name="P22">Spring Data JPA</text:p>
        </text:list-item>
        <text:list-item>
          <text:p text:style-name="P22">Hibernate</text:p>
        </text:list-item>
      </text:list>
      <text:h text:style-name="Heading_20_2" text:outline-level="2">Base de datos</text:h>
      <text:list text:style-name="L11">
        <text:list-item>
          <text:p text:style-name="P23">MySQL</text:p>
        </text:list-item>
        <text:list-item>
          <text:p text:style-name="P23">phpMyAdmin</text:p>
        </text:list-item>
      </text:list>
      <text:h text:style-name="Heading_20_2" text:outline-level="2">Frontend</text:h>
      <text:list text:style-name="L12">
        <text:list-item>
          <text:p text:style-name="P24">HTML5</text:p>
        </text:list-item>
        <text:list-item>
          <text:p text:style-name="P24">CSS3</text:p>
        </text:list-item>
        <text:list-item>
          <text:p text:style-name="P24">JavaScript</text:p>
        </text:list-item>
        <text:list-item>
          <text:p text:style-name="P24">Thymeleaf</text:p>
        </text:list-item>
      </text:list>
      <text:h text:style-name="Heading_20_2" text:outline-level="2">Entorno de desarrollo</text:h>
      <text:list text:style-name="L13">
        <text:list-item>
          <text:p text:style-name="P25">Visual Studio Code</text:p>
        </text:list-item>
        <text:list-item>
          <text:p text:style-name="P25">Maven</text:p>
        </text:list-item>
        <text:list-item>
          <text:p text:style-name="P25">XAMPP</text:p>
        </text:list-item>
      </text:list>
      <text:p text:style-name="Horizontal_20_Line"/>
      <text:h text:style-name="Heading_20_1" text:outline-level="1">3. Objetivos del proyecto</text:h>
      <text:p text:style-name="Text_20_body">El objetivo principal es digitalizar la gestión de un refugio de animales permitiendo:</text:p>
      <text:list text:style-name="L14">
        <text:list-item>
          <text:p text:style-name="P26">Gestionar adopciones.</text:p>
        </text:list-item>
        <text:list-item>
          <text:p text:style-name="P26">Gestionar animales.</text:p>
        </text:list-item>
        <text:list-item>
          <text:p text:style-name="P26">Gestionar usuarios.</text:p>
        </text:list-item>
        <text:list-item>
          <text:p text:style-name="P26"><text:soft-page-break/>Gestionar productos solidarios.</text:p>
        </text:list-item>
        <text:list-item>
          <text:p text:style-name="P26">Gestionar servicios veterinarios.</text:p>
        </text:list-item>
        <text:list-item>
          <text:p text:style-name="P26">Diferenciar permisos entre usuarios normales, empleados y administradores.</text:p>
        </text:list-item>
      </text:list>
      <text:p text:style-name="Horizontal_20_Line"/>
      <text:h text:style-name="Heading_20_1" text:outline-level="1">4. Desarrollo de la aplicación</text:h>
      <text:h text:style-name="Heading_20_2" text:outline-level="2">4.1 Creación de la estructura Spring Boot</text:h>
      <text:p text:style-name="Text_20_body">Se creó el proyecto utilizando Maven.</text:p>
      <text:p text:style-name="Text_20_body">Estructura principal:</text:p>
      <text:p text:style-name="Text_20_body">com.empresa.eco_veg</text:p>
      <text:list text:style-name="L15">
        <text:list-item>
          <text:p text:style-name="P27">controller</text:p>
        </text:list-item>
        <text:list-item>
          <text:p text:style-name="P27">model</text:p>
        </text:list-item>
        <text:list-item>
          <text:p text:style-name="P27">repository</text:p>
        </text:list-item>
        <text:list-item>
          <text:p text:style-name="P27">config</text:p>
        </text:list-item>
        <text:list-item>
          <text:p text:style-name="P27">templates</text:p>
        </text:list-item>
        <text:list-item>
          <text:p text:style-name="P27">static</text:p>
        </text:list-item>
      </text:list>
      <text:p text:style-name="Horizontal_20_Line"/>
      <text:h text:style-name="Heading_20_2" text:outline-level="2">4.2 Creación de la página principal</text:h>
      <text:p text:style-name="Text_20_body">Se diseñó una página principal con:</text:p>
      <text:list text:style-name="L16">
        <text:list-item>
          <text:p text:style-name="P28">Menú superior fijo.</text:p>
        </text:list-item>
        <text:list-item>
          <text:p text:style-name="P28">Animación de entrada desde la parte superior.</text:p>
        </text:list-item>
        <text:list-item>
          <text:p text:style-name="P28">Sección principal de bienvenida.</text:p>
        </text:list-item>
        <text:list-item>
          <text:p text:style-name="P28">Carrusel automático de animales.</text:p>
        </text:list-item>
        <text:list-item>
          <text:p text:style-name="P28">Sección "Sobre Nosotros".</text:p>
        </text:list-item>
        <text:list-item>
          <text:p text:style-name="P28">Sección "Servicios".</text:p>
        </text:list-item>
      </text:list>
      <text:h text:style-name="Heading_20_3" text:outline-level="3">Funcionalidades implementadas</text:h>
      <text:list text:style-name="L17">
        <text:list-item>
          <text:p text:style-name="P29">Animación de carga.</text:p>
        </text:list-item>
        <text:list-item>
          <text:p text:style-name="P29">Navegación mediante menú.</text:p>
        </text:list-item>
        <text:list-item>
          <text:p text:style-name="P29">Carrusel automático.</text:p>
        </text:list-item>
        <text:list-item>
          <text:p text:style-name="P29">Diseño responsive.</text:p>
        </text:list-item>
      </text:list>
      <text:p text:style-name="Horizontal_20_Line"/>
      <text:h text:style-name="Heading_20_2" text:outline-level="2"><text:soft-page-break/>4.3 Carrusel de animales</text:h>
      <text:p text:style-name="Text_20_body">Se creó un carrusel horizontal donde aparecen los animales en adopción.</text:p>
      <text:p text:style-name="Text_20_body">Características:</text:p>
      <text:list text:style-name="L18">
        <text:list-item>
          <text:p text:style-name="P30">Movimiento automático.</text:p>
        </text:list-item>
        <text:list-item>
          <text:p text:style-name="P30">Imágenes de animales.</text:p>
        </text:list-item>
        <text:list-item>
          <text:p text:style-name="P30">Nombre del animal.</text:p>
        </text:list-item>
        <text:list-item>
          <text:p text:style-name="P30">Interacción mediante clic.</text:p>
        </text:list-item>
      </text:list>
      <text:p text:style-name="Text_20_body">Al pulsar sobre un animal se muestra una ficha rápida utilizando JavaScript.</text:p>
      <text:p text:style-name="Text_20_body">La ficha muestra:</text:p>
      <text:list text:style-name="L19">
        <text:list-item>
          <text:p text:style-name="P31">Nombre.</text:p>
        </text:list-item>
        <text:list-item>
          <text:p text:style-name="P31">Edad.</text:p>
        </text:list-item>
        <text:list-item>
          <text:p text:style-name="P31">Especie.</text:p>
        </text:list-item>
        <text:list-item>
          <text:p text:style-name="P31">Descripción.</text:p>
        </text:list-item>
      </text:list>
      <text:p text:style-name="Text_20_body">Posteriormente se añadió la posibilidad de acceder al formulario de adopción.</text:p>
      <text:p text:style-name="Horizontal_20_Line"/>
      <text:h text:style-name="Heading_20_2" text:outline-level="2">4.4 Página de adopciones</text:h>
      <text:p text:style-name="Text_20_body">Se creó una página específica para adopciones.</text:p>
      <text:p text:style-name="Text_20_body">Organización:</text:p>
      <text:list text:style-name="L20">
        <text:list-item>
          <text:p text:style-name="P32">Perros.</text:p>
        </text:list-item>
        <text:list-item>
          <text:p text:style-name="P32">Gatos.</text:p>
        </text:list-item>
        <text:list-item>
          <text:p text:style-name="P32">Otras especies.</text:p>
        </text:list-item>
      </text:list>
      <text:p text:style-name="Text_20_body">Cada animal muestra:</text:p>
      <text:list text:style-name="L21">
        <text:list-item>
          <text:p text:style-name="P33">Fotografía.</text:p>
        </text:list-item>
        <text:list-item>
          <text:p text:style-name="P33">Nombre.</text:p>
        </text:list-item>
        <text:list-item>
          <text:p text:style-name="P33">Edad.</text:p>
        </text:list-item>
        <text:list-item>
          <text:p text:style-name="P33">Raza.</text:p>
        </text:list-item>
        <text:list-item>
          <text:p text:style-name="P33">Descripción.</text:p>
        </text:list-item>
        <text:list-item>
          <text:p text:style-name="P33">Botón de adopción.</text:p>
        </text:list-item>
      </text:list>
      <text:p text:style-name="Text_20_body">Inicialmente los datos estaban escritos manualmente.</text:p>
      <text:p text:style-name="Text_20_body">Posteriormente se migraron a base de datos.</text:p>
      <text:p text:style-name="Horizontal_20_Line"/>
      <text:h text:style-name="Heading_20_2" text:outline-level="2"><text:soft-page-break/>4.5 Servicios veterinarios</text:h>
      <text:p text:style-name="Text_20_body">Se creó una página específica para mostrar servicios veterinarios.</text:p>
      <text:p text:style-name="Text_20_body">Servicios incluidos:</text:p>
      <text:list text:style-name="L22">
        <text:list-item>
          <text:p text:style-name="P34">Consulta general.</text:p>
        </text:list-item>
        <text:list-item>
          <text:p text:style-name="P34">Cirugía.</text:p>
        </text:list-item>
        <text:list-item>
          <text:p text:style-name="P34">Vacunación.</text:p>
        </text:list-item>
        <text:list-item>
          <text:p text:style-name="P34">Hospitalización.</text:p>
        </text:list-item>
      </text:list>
      <text:p text:style-name="Horizontal_20_Line"/>
      <text:h text:style-name="Heading_20_2" text:outline-level="2">4.6 Página de rescate animal</text:h>
      <text:p text:style-name="Text_20_body">Se implementó una página destinada a facilitar la localización de animales perdidos.</text:p>
      <text:p text:style-name="Text_20_body">Información incluida:</text:p>
      <text:list text:style-name="L23">
        <text:list-item>
          <text:p text:style-name="P35">Teléfonos de contacto.</text:p>
        </text:list-item>
        <text:list-item>
          <text:p text:style-name="P35">Recomendaciones.</text:p>
        </text:list-item>
        <text:list-item>
          <text:p text:style-name="P35">Procedimiento de actuación.</text:p>
        </text:list-item>
      </text:list>
      <text:p text:style-name="Horizontal_20_Line"/>
      <text:h text:style-name="Heading_20_2" text:outline-level="2">4.7 Campañas solidarias</text:h>
      <text:p text:style-name="Text_20_body">Se creó una página para campañas solidarias.</text:p>
      <text:p text:style-name="Text_20_body">Ejemplos:</text:p>
      <text:list text:style-name="L24">
        <text:list-item>
          <text:p text:style-name="P36">Calendarios solidarios.</text:p>
        </text:list-item>
        <text:list-item>
          <text:p text:style-name="P36">Camisetas.</text:p>
        </text:list-item>
        <text:list-item>
          <text:p text:style-name="P36">Productos benéficos.</text:p>
        </text:list-item>
      </text:list>
      <text:p text:style-name="Horizontal_20_Line"/>
      <text:h text:style-name="Heading_20_1" text:outline-level="1">5. Sistema de Login</text:h>
      <text:p text:style-name="Text_20_body">Se implementó Spring Security.</text:p>
      <text:p text:style-name="Text_20_body">Usuarios iniciales:</text:p>
      <text:p text:style-name="Text_20_body">ADMIN</text:p>
      <text:p text:style-name="Text_20_body">Usuario:<text:line-break/>admin</text:p>
      <text:p text:style-name="Text_20_body">Contraseña:<text:line-break/>1234</text:p>
      <text:p text:style-name="Text_20_body"><text:soft-page-break/>EMPLEADO</text:p>
      <text:p text:style-name="Text_20_body">Usuario:<text:line-break/>empleado</text:p>
      <text:p text:style-name="Text_20_body">Contraseña:<text:line-break/>1234</text:p>
      <text:p text:style-name="Horizontal_20_Line"/>
      <text:h text:style-name="Heading_20_1" text:outline-level="1">6. Problemas encontrados durante la implementación</text:h>
      <text:h text:style-name="Heading_20_2" text:outline-level="2">Problema 1: Maven no reconocido</text:h>
      <text:p text:style-name="Text_20_body">Error:</text:p>
      <text:p text:style-name="Text_20_body">mvn : El término 'mvn' no se reconoce...</text:p>
      <text:p text:style-name="Text_20_body">Causa:</text:p>
      <text:p text:style-name="Text_20_body">Maven no estaba instalado o configurado en el PATH.</text:p>
      <text:p text:style-name="Text_20_body">Solución:</text:p>
      <text:list text:style-name="L25">
        <text:list-item>
          <text:p text:style-name="P37">Instalar Maven.</text:p>
        </text:list-item>
        <text:list-item>
          <text:p text:style-name="P37">Configurar variables de entorno.</text:p>
        </text:list-item>
        <text:list-item>
          <text:p text:style-name="P37">Reiniciar terminal.</text:p>
        </text:list-item>
      </text:list>
      <text:p text:style-name="Horizontal_20_Line"/>
      <text:h text:style-name="Heading_20_2" text:outline-level="2">Problema 2: Redirección constante al Login</text:h>
      <text:p text:style-name="Text_20_body">Síntoma:</text:p>
      <text:p text:style-name="Text_20_body">Todas las páginas redirigían automáticamente al login.</text:p>
      <text:p text:style-name="Text_20_body">Causa:</text:p>
      <text:p text:style-name="Text_20_body">Configuración incorrecta de Spring Security.</text:p>
      <text:p text:style-name="Text_20_body">Solución:</text:p>
      <text:p text:style-name="Text_20_body">Añadir permisos públicos:</text:p>
      <text:p text:style-name="Text_20_body">.requestMatchers(<text:line-break/>"/",<text:line-break/>"/adopciones",<text:line-break/>"/veterinaria",<text:line-break/>"/rescate",<text:line-break/>"/campanas",<text:line-break/>"/formulario-adopcion",<text:line-break/><text:soft-page-break/>"/enviar-adopcion"<text:line-break/>).permitAll()</text:p>
      <text:p text:style-name="Horizontal_20_Line"/>
      <text:h text:style-name="Heading_20_2" text:outline-level="2">Problema 3: Duplicidad de mappings</text:h>
      <text:p text:style-name="Text_20_body">Error:</text:p>
      <text:p text:style-name="Text_20_body">Ambiguous mapping</text:p>
      <text:p text:style-name="Text_20_body">Causa:</text:p>
      <text:p text:style-name="Text_20_body">Existían dos métodos asociados a la misma ruta.</text:p>
      <text:p text:style-name="Text_20_body">Ejemplo:</text:p>
      <text:p text:style-name="Text_20_body">POST /enviar-adopcion</text:p>
      <text:p text:style-name="Text_20_body">en HomeController y AdopcionController.</text:p>
      <text:p text:style-name="Text_20_body">Solución:</text:p>
      <text:p text:style-name="Text_20_body">Eliminar los mappings duplicados.</text:p>
      <text:p text:style-name="Horizontal_20_Line"/>
      <text:h text:style-name="Heading_20_2" text:outline-level="2">Problema 4: Error 400 al enviar formularios</text:h>
      <text:p text:style-name="Text_20_body">Error:</text:p>
      <text:p text:style-name="Text_20_body">Bad Request 400</text:p>
      <text:p text:style-name="Text_20_body">Causa:</text:p>
      <text:p text:style-name="Text_20_body">Los campos HTML no tenían atributo name.</text:p>
      <text:p text:style-name="Text_20_body">Ejemplo incorrecto:</text:p>
      <text:p text:style-name="Text_20_body">Ejemplo correcto:</text:p>
      <text:p text:style-name="Text_20_body">Solución:</text:p>
      <text:p text:style-name="Text_20_body">Añadir todos los atributos name necesarios.</text:p>
      <text:p text:style-name="Horizontal_20_Line"/>
      <text:h text:style-name="Heading_20_2" text:outline-level="2">Problema 5: Mensaje de confirmación no desaparecía</text:h>
      <text:p text:style-name="Text_20_body">Se implementó un mensaje flash tras enviar una solicitud.</text:p>
      <text:p text:style-name="Text_20_body">Posteriormente se añadió JavaScript para ocultarlo automáticamente tras 3 segundos.</text:p>
      <text:p text:style-name="Horizontal_20_Line"/>
      <text:h text:style-name="Heading_20_1" text:outline-level="1">7. Integración con MySQL</text:h>
      <text:p text:style-name="Text_20_body">Inicialmente se utilizó H2.</text:p>
      <text:p text:style-name="Text_20_body"><text:soft-page-break/>Posteriormente se migró a MySQL mediante XAMPP y phpMyAdmin.</text:p>
      <text:p text:style-name="Text_20_body">Base de datos:</text:p>
      <text:p text:style-name="Text_20_body">eco_veg</text:p>
      <text:p text:style-name="Horizontal_20_Line"/>
      <text:h text:style-name="Heading_20_1" text:outline-level="1">8. Modelo de datos</text:h>
      <text:h text:style-name="Heading_20_2" text:outline-level="2">Tabla Animal</text:h>
      <text:p text:style-name="Text_20_body">Campos:</text:p>
      <text:list text:style-name="L26">
        <text:list-item>
          <text:p text:style-name="P38">id</text:p>
        </text:list-item>
        <text:list-item>
          <text:p text:style-name="P38">nombre</text:p>
        </text:list-item>
        <text:list-item>
          <text:p text:style-name="P38">especie</text:p>
        </text:list-item>
        <text:list-item>
          <text:p text:style-name="P38">raza</text:p>
        </text:list-item>
        <text:list-item>
          <text:p text:style-name="P38">edad</text:p>
        </text:list-item>
        <text:list-item>
          <text:p text:style-name="P38">descripcion</text:p>
        </text:list-item>
        <text:list-item>
          <text:p text:style-name="P38">imagen_url</text:p>
        </text:list-item>
        <text:list-item>
          <text:p text:style-name="P38">adoptado</text:p>
        </text:list-item>
      </text:list>
      <text:p text:style-name="Horizontal_20_Line"/>
      <text:h text:style-name="Heading_20_2" text:outline-level="2">Tabla Usuario</text:h>
      <text:p text:style-name="Text_20_body">Campos:</text:p>
      <text:list text:style-name="L27">
        <text:list-item>
          <text:p text:style-name="P39">id</text:p>
        </text:list-item>
        <text:list-item>
          <text:p text:style-name="P39">username</text:p>
        </text:list-item>
        <text:list-item>
          <text:p text:style-name="P39">password</text:p>
        </text:list-item>
        <text:list-item>
          <text:p text:style-name="P39">rol</text:p>
        </text:list-item>
      </text:list>
      <text:p text:style-name="Text_20_body">Roles:</text:p>
      <text:list text:style-name="L28">
        <text:list-item>
          <text:p text:style-name="P40">ADMIN</text:p>
        </text:list-item>
        <text:list-item>
          <text:p text:style-name="P40">EMPLEADO</text:p>
        </text:list-item>
        <text:list-item>
          <text:p text:style-name="P40">CLIENTE</text:p>
        </text:list-item>
      </text:list>
      <text:p text:style-name="Horizontal_20_Line"/>
      <text:h text:style-name="Heading_20_2" text:outline-level="2">Tabla Adopcion</text:h>
      <text:p text:style-name="Text_20_body">Campos:</text:p>
      <text:list text:style-name="L29">
        <text:list-item>
          <text:p text:style-name="P41"><text:soft-page-break/>id</text:p>
        </text:list-item>
        <text:list-item>
          <text:p text:style-name="P41">usuario</text:p>
        </text:list-item>
        <text:list-item>
          <text:p text:style-name="P41">telefono</text:p>
        </text:list-item>
        <text:list-item>
          <text:p text:style-name="P41">email</text:p>
        </text:list-item>
        <text:list-item>
          <text:p text:style-name="P41">motivo</text:p>
        </text:list-item>
        <text:list-item>
          <text:p text:style-name="P41">experiencia</text:p>
        </text:list-item>
        <text:list-item>
          <text:p text:style-name="P41">fecha_solicitud</text:p>
        </text:list-item>
        <text:list-item>
          <text:p text:style-name="P41">estado</text:p>
        </text:list-item>
        <text:list-item>
          <text:p text:style-name="P41">animal_id</text:p>
        </text:list-item>
      </text:list>
      <text:p text:style-name="Horizontal_20_Line"/>
      <text:h text:style-name="Heading_20_2" text:outline-level="2">Estados de adopción</text:h>
      <text:p text:style-name="Text_20_body">Se implementó un enum.</text:p>
      <text:p text:style-name="Text_20_body">Valores:</text:p>
      <text:p text:style-name="Text_20_body">NO_ADOPTADO<text:line-break/>PENDIENTE<text:line-break/>ADOPTADO</text:p>
      <text:p text:style-name="Text_20_body">Flujo:</text:p>
      <text:p text:style-name="Text_20_body">Animal disponible<text:line-break/>↓<text:line-break/>Solicitud enviada<text:line-break/>↓<text:line-break/>PENDIENTE<text:line-break/>↓<text:line-break/>Aprobación administrador<text:line-break/>↓<text:line-break/>ADOPTADO</text:p>
      <text:p text:style-name="Horizontal_20_Line"/>
      <text:h text:style-name="Heading_20_1" text:outline-level="1">9. Relación entre entidades</text:h>
      <text:p text:style-name="Text_20_body">Animal</text:p>
      <text:p text:style-name="Text_20_body">1 → N</text:p>
      <text:p text:style-name="Text_20_body">Adopcion</text:p>
      <text:p text:style-name="Text_20_body">Un animal puede tener múltiples solicitudes.</text:p>
      <text:p text:style-name="Text_20_body">Una solicitud pertenece a un único animal.</text:p>
      <text:p text:style-name="Horizontal_20_Line"/>
      <text:h text:style-name="Heading_20_1" text:outline-level="1"><text:soft-page-break/>10. Gestión de adopciones</text:h>
      <text:p text:style-name="Text_20_body">Cuando un usuario envía una solicitud:</text:p>
      <text:list text:style-name="L30">
        <text:list-item>
          <text:p text:style-name="P42">Se valida el animal.</text:p>
        </text:list-item>
        <text:list-item>
          <text:p text:style-name="P42">Se comprueba si ya está adoptado.</text:p>
        </text:list-item>
        <text:list-item>
          <text:p text:style-name="P42">Se genera la adopción.</text:p>
        </text:list-item>
        <text:list-item>
          <text:p text:style-name="P42">Estado inicial = PENDIENTE.</text:p>
        </text:list-item>
        <text:list-item>
          <text:p text:style-name="P42">Se almacena en MySQL.</text:p>
        </text:list-item>
        <text:list-item>
          <text:p text:style-name="P42">Se muestra mensaje de confirmación.</text:p>
        </text:list-item>
      </text:list>
      <text:p text:style-name="Horizontal_20_Line"/>
      <text:h text:style-name="Heading_20_1" text:outline-level="1">11. Evitar adopciones duplicadas</text:h>
      <text:p text:style-name="Text_20_body">Se añadió una validación:</text:p>
      <text:p text:style-name="Text_20_body">Si el animal ya está marcado como adoptado:</text:p>
      <text:list text:style-name="L31">
        <text:list-item>
          <text:p text:style-name="P43">No se permite generar nuevas solicitudes.</text:p>
        </text:list-item>
        <text:list-item>
          <text:p text:style-name="P43">Se informa al usuario.</text:p>
        </text:list-item>
      </text:list>
      <text:p text:style-name="Horizontal_20_Line"/>
      <text:h text:style-name="Heading_20_1" text:outline-level="1">12. Panel de administración</text:h>
      <text:p text:style-name="Text_20_body">Se comenzó la implementación de un panel administrativo.</text:p>
      <text:p text:style-name="Text_20_body">Funcionalidades previstas:</text:p>
      <text:h text:style-name="Heading_20_2" text:outline-level="2">Gestión de animales</text:h>
      <text:p text:style-name="Text_20_body">CRUD completo:</text:p>
      <text:list text:style-name="L32">
        <text:list-item>
          <text:p text:style-name="P44">Crear.</text:p>
        </text:list-item>
        <text:list-item>
          <text:p text:style-name="P44">Modificar.</text:p>
        </text:list-item>
        <text:list-item>
          <text:p text:style-name="P44">Eliminar.</text:p>
        </text:list-item>
        <text:list-item>
          <text:p text:style-name="P44">Consultar.</text:p>
        </text:list-item>
      </text:list>
      <text:h text:style-name="Heading_20_2" text:outline-level="2">Gestión de productos</text:h>
      <text:p text:style-name="Text_20_body">CRUD completo.</text:p>
      <text:h text:style-name="Heading_20_2" text:outline-level="2">Gestión de servicios veterinarios</text:h>
      <text:p text:style-name="Text_20_body">CRUD completo.</text:p>
      <text:h text:style-name="Heading_20_2" text:outline-level="2"><text:soft-page-break/>Gestión de adopciones</text:h>
      <text:list text:style-name="L33">
        <text:list-item>
          <text:p text:style-name="P45">Ver solicitudes.</text:p>
        </text:list-item>
        <text:list-item>
          <text:p text:style-name="P45">Aprobar adopciones.</text:p>
        </text:list-item>
        <text:list-item>
          <text:p text:style-name="P45">Cambiar estados.</text:p>
        </text:list-item>
      </text:list>
      <text:p text:style-name="Horizontal_20_Line"/>
      <text:h text:style-name="Heading_20_1" text:outline-level="1">13. Mejoras futuras</text:h>
      <text:list text:style-name="L34">
        <text:list-item>
          <text:p text:style-name="P46">Subida real de imágenes.</text:p>
        </text:list-item>
        <text:list-item>
          <text:p text:style-name="P46">Registro de usuarios.</text:p>
        </text:list-item>
        <text:list-item>
          <text:p text:style-name="P46">Recuperación de contraseña.</text:p>
        </text:list-item>
        <text:list-item>
          <text:p text:style-name="P46">Dashboard administrativo.</text:p>
        </text:list-item>
        <text:list-item>
          <text:p text:style-name="P46">Estadísticas de adopciones.</text:p>
        </text:list-item>
        <text:list-item>
          <text:p text:style-name="P46">Historial veterinario.</text:p>
        </text:list-item>
        <text:list-item>
          <text:p text:style-name="P46">Gestión documental.</text:p>
        </text:list-item>
        <text:list-item>
          <text:p text:style-name="P46">API REST.</text:p>
        </text:list-item>
        <text:list-item>
          <text:p text:style-name="P46">Despliegue en servidor productivo.</text:p>
        </text:list-item>
      </text:list>
      <text:p text:style-name="Horizontal_20_Line"/>
      <text:h text:style-name="Heading_20_1" text:outline-level="1">14. Estado actual del proyecto</text:h>
      <text:p text:style-name="Text_20_body">Actualmente la aplicación permite:</text:p>
      <text:p text:style-name="Text_20_body">✔ Navegación completa.</text:p>
      <text:p text:style-name="Text_20_body">✔ Login mediante Spring Security.</text:p>
      <text:p text:style-name="Text_20_body">✔ Integración con MySQL.</text:p>
      <text:p text:style-name="Text_20_body">✔ Gestión de animales.</text:p>
      <text:p text:style-name="Text_20_body">✔ Solicitudes de adopción.</text:p>
      <text:p text:style-name="Text_20_body">✔ Estados de adopción.</text:p>
      <text:p text:style-name="Text_20_body">✔ Gestión de usuarios.</text:p>
      <text:p text:style-name="Text_20_body">✔ Página veterinaria.</text:p>
      <text:p text:style-name="Text_20_body">✔ Página de rescate.</text:p>
      <text:p text:style-name="Text_20_body">✔ Página de campañas.</text:p>
      <text:p text:style-name="Text_20_body">✔ Base de datos funcional.</text:p>
      <text:p text:style-name="Text_20_body">✔ Preparación para CRUD administrativo.</text:p>
      <text:p text:style-name="Text_20_body"><text:soft-page-break/>El proyecto se encuentra en una fase funcional avanzada con la estructura preparada para continuar ampliando funcionalidades administrativas y de gestión.</text:p>
      <text:p text:style-name="Standard"><text:line-break/><text:line-break/><text:span text:style-name="T1">****************************************************************</text:span></text:p>
      <text:p text:style-name="Standard"/>
      <text:p text:style-name="Standard"/>
      <text:p text:style-name="P4">Funcionamiento de las Anotaciones de Hibernate (JPA)</text:p>
      <text:p text:style-name="P5">Hibernate utiliza anotaciones sobre clases Java normales para transformarlas en entidades persistentes y mapear las relaciones relacionales de la base de datos sin escribir codigo SQL manual.</text:p>
      <text:p text:style-name="P4">Anotaciones de Entidad y Clave Primaria</text:p>
      <text:list text:style-name="L35">
        <text:list-item>
          <text:p text:style-name="P47">@Entity: Le indica a Spring Boot y al motor de Hibernate que la clase Java debe ser tratada como una tabla de la base de datos. Cada objeto creado a partir de esta clase representara una fila fisica en MySQL.</text:p>
        </text:list-item>
        <text:list-item>
          <text:p text:style-name="P47">@Id: Define de forma explicita que la propiedad que tiene justo debajo es la clave primaria (Primary Key) unica e irrepetible de la tabla.</text:p>
        </text:list-item>
        <text:list-item>
          <text:p text:style-name="P47">@GeneratedValue(strategy = GenerationType.IDENTITY): Configura la clave primaria para que sea autoincremental en la base de datos. MySQL se encargara de asignar los numeros correlativos (1, 2, 3...) de forma automatica cada vez que se inserte un registro.</text:p>
        </text:list-item>
        <text:list-item>
          <text:p text:style-name="P47">@Column(name = "nombre_columna"): Permite personalizar la columna de la base de datos. Se utiliza para forzar un nombre especifico con guiones bajos o para aplicar restricciones como limites de tamaño (ej: length = 9 para el telefono).</text:p>
        </text:list-item>
      </text:list>
      <text:p text:style-name="P57">Anotaciones de Relacion y Enumerados</text:p>
      <text:list text:style-name="L36">
        <text:list-item>
          <text:p text:style-name="P48">@ManyToOne: Define una relacion relacional de muchos a uno. En el contexto de este proyecto, significa que muchas solicitudes de Adopcion pueden pertenecer a un unico Usuario, y muchas solicitudes de Adopcion pueden estar asociadas a un unico Animal.</text:p>
        </text:list-item>
        <text:list-item>
          <text:p text:style-name="P48">@JoinColumn(name = "columna_id", nullable = false): Trabaja junto a @ManyToOne para indicarle a MySQL el nombre exacto que tendra la columna de la clave foranea (Foreign Key). La propiedad nullable = false obliga a que la relacion sea obligatoria, impidiendo que se guarden adopciones huerfanas sin usuario o sin animal.</text:p>
        </text:list-item>
        <text:list-item>
          <text:p text:style-name="P48">@Enumerated(EnumType.STRING): Se coloca sobre atributos de tipo Enum (como EstadoAdopcion). Le indica a Hibernate que debe guardar el estado en la base de datos como una cadena de texto (ej: "PENDIENTE", "ADOPTADO") en lugar de su indice numerico por defecto (0, 1), facilitando la lectura directa de los datos en phpMyAdmin.</text:p>
        </text:list-item>
      </text:list>
      <text:p text:style-name="Horizontal_20_Line"/>
      <text:p text:style-name="P57">2. Comprension de POM y la Automatizacion de Maven</text:p>
      <text:p text:style-name="P49"><text:soft-page-break/>Maven es el gestor de dependencias y la herramienta de construccion (build) oficial del proyecto. Su comportamiento se centraliza por completo en el archivo pom.xml.</text:p>
      <text:p text:style-name="P57">El Archivo pom.xml (Project Object Model)</text:p>
      <text:p text:style-name="P49">El pom.xml es el archivo de configuracion en formato XML que le dice a Maven que librerias necesita el proyecto para funcionar, que versiones de Java debe utilizar y como debe compilarse el codigo fuente.</text:p>
      <text:list text:style-name="L37">
        <text:list-item>
          <text:p text:style-name="P50">Bloque Parent: Actua como una herencia global. Al definir el spring-boot-starter-parent en su version 3.4.3, el proyecto importa de forma invisible todas las configuraciones estandar, compatibilidades de componentes y versiones estables testeadas por el equipo de Spring, evitando conflictos entre librerias de terceros.</text:p>
        </text:list-item>
        <text:list-item>
          <text:p text:style-name="P50">Bloque Dependencies: Es la lista de la compra del proyecto. Aqui se declaran los Starters (paquetes de inicio). Al poner spring-boot-starter-data-jpa, Maven sabe que debe descargar Hibernate, los conectores basicos de persistencia y las utilidades de Spring Data de internet, guardandolas en una cache local del ordenador para que esten accesibles en el codigo (desactivando las lineas rojas del editor).</text:p>
        </text:list-item>
      </text:list>
      <text:p text:style-name="P57">El Ciclo de Vida de Maven y Comandos Utilizados</text:p>
      <text:p text:style-name="P49">Maven automatiza la compilacion mediante fases encadenadas. El uso del comando "./mvnw clean install" ejecuta el siguiente ciclo:</text:p>
      <text:list text:style-name="L38">
        <text:list-item>
          <text:p text:style-name="P51">clean: Borra por completo la carpeta temporal "target", eliminando cualquier archivo compilado antiguo o rastro de cache corrupta del editor.</text:p>
        </text:list-item>
        <text:list-item>
          <text:p text:style-name="P51">compile: Lee el codigo fuente de la carpeta "src/", comprueba que no existan errores de sintaxis y traduce los archivos .java a archivos binarios .class que entiende la maquina virtual.</text:p>
        </text:list-item>
        <text:list-item>
          <text:p text:style-name="P51">test: Ejecuta las pruebas unitarias del proyecto para comprobar que los componentes no se han roto tras los cambios (el parametro -DskipTests se utiliza para saltarse esta fase temporalmente y ahorrar tiempo).</text:p>
        </text:list-item>
        <text:list-item>
          <text:p text:style-name="P51">install: Empaqueta todo el proyecto compilado junto a sus recursos (HTML, imagenes) dentro de un unico archivo ejecutable comprimido (formato .jar) listo para ser desplegado en produccion.</text:p>
        </text:list-item>
      </text:list>
      <text:p text:style-name="Horizontal_20_Line"/>
      <text:p text:style-name="P57">3. Configuracion del Servidor (application.properties)</text:p>
      <text:p text:style-name="P58">properties</text:p>
      <text:p text:style-name="P2"><text:span text:style-name="Source_20_Text"><text:span text:style-name="T2">server.port=8081</text:span></text:span></text:p>
      <text:p text:style-name="P3"><text:span text:style-name="Source_20_Text"><text:span text:style-name="T2">spring.datasource.url=jdbc:mysql://localhost:3306/eco_veg</text:span></text:span></text:p>
      <text:p text:style-name="P3"><text:span text:style-name="Source_20_Text"><text:span text:style-name="T2">spring.datasource.username=root</text:span></text:span></text:p>
      <text:p text:style-name="P3"><text:span text:style-name="Source_20_Text"><text:span text:style-name="T2">spring.datasource.password=</text:span></text:span></text:p>
      <text:p text:style-name="P3"/>
      <text:p text:style-name="P3"><text:soft-page-break/><text:span text:style-name="Source_20_Text"><text:span text:style-name="T2"># Propiedad fija para congelar datos en desarrollo</text:span></text:span></text:p>
      <text:p text:style-name="P3"><text:span text:style-name="Source_20_Text"><text:span text:style-name="T2">spring.jpa.hibernate.ddl-auto=update</text:span></text:span></text:p>
      <text:p text:style-name="P3"><text:span text:style-name="Source_20_Text"><text:span text:style-name="T2">spring.jpa.show-sql=true</text:span></text:span></text:p>
      <text:p text:style-name="P59">Usa el código con precaución.</text:p>
      <text:p text:style-name="Horizontal_20_Line"/>
      <text:p text:style-name="P57">4. Estructura de Rutas del Menu (nav)</text:p>
      <text:list text:style-name="L39">
        <text:list-item>
          <text:p text:style-name="P52">Secciones Locales (Misma pagina): href="#inicio" y href="#nosotros"</text:p>
        </text:list-item>
        <text:list-item>
          <text:p text:style-name="P52">Paginas Independientes (Vistas Publicas): /adopciones, /tienda, /veterinaria y /login</text:p>
        </text:list-item>
        <text:list-item>
          <text:p text:style-name="P52">Rutas Protegidas (Gestion Privada): Todas las rutas que comienzan por /admin/** (ej: /admin/adopciones)</text:p>
        </text:list-item>
      </text:list>
      <text:p text:style-name="Horizontal_20_Line"/>
      <text:p text:style-name="P57">5. Modelo de Datos Relacional Completo</text:p>
      <text:p text:style-name="P49">La entidad Adopcion conecta las claves foraneas de las tablas maestras mediante herencia de datos en tiempo real:</text:p>
      <text:p text:style-name="P49">[Usuario (usuario_id)] ---&gt; (N) [Adopcion] (N) &lt;--- [Animal (animal_id)]</text:p>
      <text:list text:style-name="L40">
        <text:list-item>
          <text:p text:style-name="P53">Consistencia absoluta: No se duplica informacion como texto plano (telefono, email, nombre_animal). Spring Data JPA viaja dinamicamente a las tablas padres para extraer la informacion.</text:p>
        </text:list-item>
        <text:list-item>
          <text:p text:style-name="P53">Tipo de Dato de Telefono: Configurado estrictamente como String de 9 digitos (VARCHAR(9)) para prevenir desbordamientos numericos de base de datos en numeros de Espana.</text:p>
        </text:list-item>
      </text:list>
      <text:p text:style-name="Horizontal_20_Line"/>
      <text:p text:style-name="P57">6. Guia Definitiva de Solucion de Errores (Ultima Instancia)</text:p>
      <text:p text:style-name="P49">Si el proyecto sufre bloqueos visuales en el IDE o lanza errores de servidor, ejecuta estas soluciones secuenciales:</text:p>
      <text:p text:style-name="P57">Error 404 / Lineas Rojas en el Editor (Fallo de Maven o Seguridad)</text:p>
      <text:list text:style-name="L41">
        <text:list-item>
          <text:p text:style-name="P54">Corregir Version de Spring Boot: Asegura que en el pom.xml el parent este en la version estable 3.4.3 (nunca versiones inexistentes como la 4.0.0).</text:p>
        </text:list-item>
        <text:list-item>
          <text:p text:style-name="P60"><text:span text:style-name="T4">Dependencia Web Correcta: Comprueba que usas </text:span><text:span text:style-name="Source_20_Text"><text:span text:style-name="T3">&lt;artifactId&gt;spring-boot-starter-web&lt;/artifactId&gt;</text:span></text:span><text:span text:style-name="T4"> (elimina webmvc si existe).</text:span></text:p>
        </text:list-item>
        <text:list-item>
          <text:p text:style-name="P54">Limpieza Absoluta de Cache en VS Code:</text:p>
          <text:list>
            <text:list-item>
              <text:p text:style-name="P54">Borra manualmente la carpeta temporal target del explorador de archivos.</text:p>
            </text:list-item>
            <text:list-item>
              <text:p text:style-name="P54"><text:soft-page-break/>Abre la terminal (Ctrl + N) y ejecuta: ./mvnw clean install -DskipTests (Debe devolver BUILD SUCCESS).</text:p>
            </text:list-item>
            <text:list-item>
              <text:p text:style-name="P54">Pulsa Ctrl + Shift + P -&gt; Ejecuta Java: Clean Java Language Server Workspace -&gt; Restart.</text:p>
            </text:list-item>
          </text:list>
        </text:list-item>
      </text:list>
      <text:p text:style-name="P57">Error 500 al Entrar a Paneles de Administracion (Campos Null)</text:p>
      <text:list text:style-name="L42">
        <text:list-item>
          <text:p text:style-name="P55">Causa: Registros antiguos con columnas corruptas o vacias en las relaciones.</text:p>
        </text:list-item>
        <text:list-item>
          <text:p text:style-name="P55">Solucion en Codigo: Implementar operaciones ternarias de control en los bucles del controlador: a.getEstado() != null ? a.getEstado().toString() : "PENDIENTE".</text:p>
        </text:list-item>
        <text:list-item>
          <text:p text:style-name="P55">Parche de Limpieza Rapida: Anadir una ruta temporal en el controlador para purgar la tabla desde el navegador de forma controlada sin usar gestores externos: adopcionRepository.deleteAll();.</text:p>
        </text:list-item>
      </text:list>
      <text:p text:style-name="P57">Error 194 / #1932 en el Motor MySQL de XAMPP (Tablespace Corrupto)</text:p>
      <text:p text:style-name="P49">Si MySQL se apaga solo o phpMyAdmin (puerto 8080) da bloqueos de clave foranea al hacer DROP TABLE:</text:p>
      <text:list text:style-name="L43">
        <text:list-item>
          <text:p text:style-name="P56">Apaga XAMPP: Haz clic en STOP en Apache y MySQL.</text:p>
        </text:list-item>
        <text:list-item>
          <text:p text:style-name="P56">Reseteo Fisico de Fabrica: Vacia por completo la carpeta C:\xampp\mysql\data.</text:p>
        </text:list-item>
        <text:list-item>
          <text:p text:style-name="P56">Restaurar Estructura Limpia: Copia todo el contenido de C:\xampp\mysql\backup\ y pegalo dentro de la carpeta data vacia.</text:p>
        </text:list-item>
        <text:list-item>
          <text:p text:style-name="P56">Iniciar y Crear Contenedor: Arranca XAMPP, ve a phpMyAdmin y ejecuta: CREATE DATABASE eco_veg;.</text:p>
        </text:list-item>
        <text:list-item>
          <text:p text:style-name="P56">Regeneracion Nativa con Hibernate: Pon ddl-auto=create en Spring Boot, dale a Run, deja que termine de arrancar para que fabrique las tablas perfectas en MySQL, apaga el servidor y devuelvelo inmediatamente a update.</text:p>
        </text:list-item>
      </text:list>
      <text:p text:style-name="Horizontal_20_Lin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5-27T00:14:22.303000000</meta:creation-date>
    <dc:date>2026-06-05T01:03:41.770000000</dc:date>
    <meta:editing-duration>PT2M19S</meta:editing-duration>
    <meta:editing-cycles>3</meta:editing-cycles>
    <meta:generator>LibreOffice/24.2.3.2$Windows_X86_64 LibreOffice_project/433d9c2ded56988e8a90e6b2e771ee4e6a5ab2ba</meta:generator>
    <meta:document-statistic meta:table-count="0" meta:image-count="0" meta:object-count="0" meta:page-count="17" meta:paragraph-count="392" meta:word-count="2508" meta:character-count="16305" meta:non-whitespace-character-count="14343"/>
  </office:meta>
</office:document-meta>
</file>