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4900" officeooo:paragraph-rsid="00134900"/>
    </style:style>
    <style:style style:name="P2" style:family="paragraph" style:parent-style-name="Standard">
      <style:text-properties officeooo:rsid="00134900" officeooo:paragraph-rsid="00134900"/>
    </style:style>
    <style:style style:name="P3" style:family="paragraph" style:parent-style-name="Standard">
      <style:text-properties officeooo:rsid="00134900" officeooo:paragraph-rsid="0016fb46"/>
    </style:style>
    <style:style style:name="T1" style:family="text">
      <style:text-properties officeooo:rsid="0018f2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laces animales</text:p>
      <text:p text:style-name="P1"/>
      <text:p text:style-name="P1">https://i.ibb.co/q3yCtVhQ/cabra-Cata.jpg</text:p>
      <text:p text:style-name="P1">https://i.ibb.co/hxmVBwZy/cerdo-Beto.jpg</text:p>
      <text:p text:style-name="P1">https://i.ibb.co/DPfxdYMB/vaca-Lola.jpg</text:p>
      <text:p text:style-name="P1">https://i.ibb.co/JFWzppwj/perro-labrador-Chip.jpg</text:p>
      <text:p text:style-name="P1"><text:a xlink:type="simple" xlink:href="https://i.ibb.co/LDZsc5vG/perro-labrador-Neron.jpg" text:style-name="Internet_20_link" text:visited-style-name="Visited_20_Internet_20_Link">https://i.ibb.co/LDZsc5vG/perro-labrador-Neron.jpg</text:a></text:p>
      <text:p text:style-name="P1"/>
      <text:p text:style-name="P1"/>
      <text:p text:style-name="P1"/>
      <text:p text:style-name="P1"/>
      <text:p text:style-name="P3">-- ====================================================================<text:line-break/>-- 1. INSERCIÓN DE ANIMALES DISPONIBLES (LOLA, CATA Y NERÓN)<text:line-break/>-- ====================================================================<text:line-break/>INSERT INTO animal (id, microchip, nombre, especie, raza, edad, descripcion, imagen_url, adoptado) VALUES <text:line-break/>(1, 900123456, 'Lola', 'Vaca', NULL, 3, 'Muy cariñosa y juguetona', 'https://i.ibb.co/DPfxdYMB/vaca-Lola.jpg', 0),<text:line-break/>(2, 900123457, 'Cata', 'Cabra', NULL, 2, 'Tranquila', 'https://i.ibb.co/q3yCtVhQ/cabra-Cata.jpg', 0),<text:line-break/>(3, 900123458, 'Nerón', 'Perro', 'Golden', 5, 'Cariñoso y leal', '<text:a xlink:type="simple" xlink:href="https://i.ibb.co/LDZsc5vG/perro-labrador-Neron.jpg" text:style-name="Internet_20_link" text:visited-style-name="Visited_20_Internet_20_Link">https://i.ibb.co/LDZsc5vG/perro-labrador-Neron.jpg</text:a>', 0);<text:line-break/><text:line-break/><text:line-break/>-- ====================================================================<text:line-break/>-- 2. INSERCIÓN EN LA TABLA DE USUARIOS<text:line-break/>-- ====================================================================<text:line-break/>INSERT INTO usuario<text:span text:style-name="T1">s</text:span> (username, password, nombre, apellidos, telefono, email, rol) VALUES <text:line-break/>('admin_eco', 'admin123', 'Carlos', 'García Pérez', '600123456', 'admin@ecoveg.com', 'ADMIN'),<text:line-break/>('empleado_vet', 'emp123', 'Laura', 'Martínez Gómez', '611987654', 'empleado@ecoveg.com', 'EMPLEADO'),<text:line-break/>('juan_cliente', 'cli123', 'Juan', 'Rodríguez López', '622334455', 'cliente@gmail.com', 'CLIENTE');<text:line-break/><text:line-break/><text:line-break/>-- ====================================================================<text:line-break/>-- 3. INSERCIÓN EN LA TABLA DE PRODUCTOS<text:line-break/>-- ====================================================================<text:line-break/>INSERT INTO producto (nombre, descripcion, precio, imagen_url) VALUES <text:line-break/>('Pienso Vegano Premium', 'Alimento 100% vegetal, equilibrado y libre de crueldad para perros adultos.', 29.99, 'https://unsplash.com'),<text:line-break/>('Champú Ecológico Canino', 'Formulado con extracto de aloe vera natural para cuidar las pieles más sensibles.', 12.50, 'https://unsplash.com'),<text:line-break/>('Juguete de Cuerda de Algodón', 'Juguete mordedor biodegradable hecho de algodón orgánico para la salud dental.', 8.95, 'https://unsplash.com');<text:line-break/><text:line-break/><text:line-break/>-- ====================================================================<text:line-break/>-- 4. INSERCIÓN EN LA TABLA DE SERVICIOS VETERINARIOS<text:line-break/>-- ====================================================================<text:line-break/>INSERT INTO veterinario (servicio, descripcion, precio, imagen_url) VALUES <text:line-break/>('Consulta y Vacunación', 'Revisión médica completa preventiva con administración de vacunas anuales oficiales.', 45.00, 'https://unsplash.com'),<text:line-break/>('Urgencias Médicas 24h', 'Disponibilidad hospitalaria completa inmediata para situaciones críticas <text:soft-page-break/>nocturnas o festivas.', 90.00, 'https://unsplash.com'),<text:line-break/>('Limpieza Dental Avanzada', 'Eliminación de sarro mediante ultrasonidos y pulido dental bajo sedación segura.', 65.00, 'https://unsplash.com');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01T20:52:28.564000000</meta:creation-date>
    <dc:date>2026-06-05T00:06:26.325000000</dc:date>
    <meta:editing-duration>PT5H17M17S</meta:editing-duration>
    <meta:editing-cycles>4</meta:editing-cycles>
    <meta:generator>LibreOffice/24.2.3.2$Windows_X86_64 LibreOffice_project/433d9c2ded56988e8a90e6b2e771ee4e6a5ab2ba</meta:generator>
    <meta:document-statistic meta:table-count="0" meta:image-count="0" meta:object-count="0" meta:page-count="2" meta:paragraph-count="7" meta:word-count="252" meta:character-count="2870" meta:non-whitespace-character-count="2614"/>
  </office:meta>
</office:document-meta>
</file>